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A0000014B7F7E23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1.2492in" draw:z-index="0"><draw:image xlink:href="Pictures/100000000000072A0000014B7F7E23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1T10:13:29.846662771</meta:creation-date>
    <dc:date>2026-04-21T10:13:53.290896797</dc:date>
    <meta:editing-duration>PT24S</meta:editing-duration>
    <meta:editing-cycles>1</meta:editing-cycles>
    <meta:generator>LibreOffice/25.8.5.2$Linux_X86_64 LibreOffice_project/58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