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1618in" table:align="left"/>
    </style:style>
    <style:style style:name="Table1.A" style:family="table-column">
      <style:table-column-properties style:column-width="2.0688in"/>
    </style:style>
    <style:style style:name="Table1.B" style:family="table-column">
      <style:table-column-properties style:column-width="2.09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Preformatted_20_Text">
      <style:paragraph-properties fo:margin-top="0in" fo:margin-bottom="0.0972in" style:contextual-spacing="false" fo:line-height="115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's the distinction between the two goal creation methods:</text:p>
      <text:h text:style-name="P2" text:outline-level="2">API Endpoint (<text:span text:style-name="Source_20_Text">POST /agent/goals</text:span>)</text:h>
      <text:p text:style-name="Text_20_body">This is the <text:span text:style-name="Strong_20_Emphasis">external interface</text:span> — how outside clients (a frontend, CLI tool, or another service) communicate with your agent. The request comes in as HTTP with a JSON body, gets deserialized, and then your Actix-web handler processes it.</text:p>
      <text:p text:style-name="Text_20_body">Typical flow:</text:p>
      <text:list text:style-name="L1">
        <text:list-item>
          <text:p text:style-name="P3">Client sends HTTP POST with <text:span text:style-name="Source_20_Text">{"goal": "..."}</text:span> </text:p>
        </text:list-item>
        <text:list-item>
          <text:p text:style-name="P3">Actix handler receives and validates the request </text:p>
        </text:list-item>
        <text:list-item>
          <text:p text:style-name="P3">Handler calls into your domain logic </text:p>
        </text:list-item>
        <text:list-item>
          <text:p text:style-name="P4">Response returned to client </text:p>
        </text:list-item>
      </text:list>
      <text:p text:style-name="Text_20_body">This is useful for decoupled architectures where the agent runs as a service and consumers don't need to know the internals.</text:p>
      <text:h text:style-name="P2" text:outline-level="2">Programmatic (<text:span text:style-name="Source_20_Text">agent_memory.set_goal(...)</text:span>)</text:h>
      <text:p text:style-name="Text_20_body">This is the <text:span text:style-name="Strong_20_Emphasis">internal interface</text:span> — direct Rust function calls within the same process. You'd use this when:</text:p>
      <text:list text:style-name="L2">
        <text:list-item>
          <text:p text:style-name="P5">Another part of your codebase needs to set a goal (e.g., a background task, a test, or an orchestration layer) </text:p>
        </text:list-item>
        <text:list-item>
          <text:p text:style-name="P5">You're composing behaviors within the agent itself (sub-goals, goal chaining) </text:p>
        </text:list-item>
        <text:list-item>
          <text:p text:style-name="P6">You want to bypass HTTP overhead for internal operations </text:p>
        </text:list-item>
      </text:list>
      <text:p text:style-name="Text_20_body">The API endpoint likely just wraps this method internally:</text:p>
      <text:p text:style-name="P7"><text:span text:style-name="Source_20_Text">async fn create_goal(body: web::Json&lt;GoalRequest&gt;, memory: web::Data&lt;AgentMemory&gt;) -&gt; impl Responder {</text:span></text:p>
      <text:p text:style-name="P7"><text:span text:style-name="Source_20_Text"><text:s text:c="4"/>memory.set_goal(&amp;body.goal);</text:span></text:p>
      <text:p text:style-name="P7"><text:span text:style-name="Source_20_Text"><text:s text:c="4"/>HttpResponse::Created().finish()</text:span></text:p>
      <text:p text:style-name="P7"><text:span text:style-name="Source_20_Text">}</text:span></text:p>
      <text:h text:style-name="P2" text:outline-level="2">When to use which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Use case</text:p>
            </table:table-cell>
            <table:table-cell table:style-name="Table1.A1" office:value-type="string">
              <text:p text:style-name="Table_20_Heading">Method</text:p>
            </table:table-cell>
          </table:table-row>
        </table:table-header-rows>
        <table:table-row>
          <table:table-cell table:style-name="Table1.A1" office:value-type="string">
            <text:p text:style-name="Table_20_Contents">External clients / UI</text:p>
          </table:table-cell>
          <table:table-cell table:style-name="Table1.A1" office:value-type="string">
            <text:p text:style-name="Table_20_Contents">API endpoint</text:p>
          </table:table-cell>
        </table:table-row>
        <table:table-row>
          <table:table-cell table:style-name="Table1.A1" office:value-type="string">
            <text:p text:style-name="Table_20_Contents">Internal orchestration</text:p>
          </table:table-cell>
          <table:table-cell table:style-name="Table1.A1" office:value-type="string">
            <text:p text:style-name="Table_20_Contents">Programmatic</text:p>
          </table:table-cell>
        </table:table-row>
        <table:table-row>
          <table:table-cell table:style-name="Table1.A1" office:value-type="string">
            <text:p text:style-name="Table_20_Contents">Testing</text:p>
          </table:table-cell>
          <table:table-cell table:style-name="Table1.A1" office:value-type="string">
            <text:p text:style-name="Table_20_Contents">Programmatic (simpler setup)</text:p>
          </table:table-cell>
        </table:table-row>
        <table:table-row>
          <table:table-cell table:style-name="Table1.A1" office:value-type="string">
            <text:p text:style-name="Table_20_Contents">Cross-service communication</text:p>
          </table:table-cell>
          <table:table-cell table:style-name="Table1.A1" office:value-type="string">
            <text:p text:style-name="Table_20_Contents">API endpoint</text:p>
          </table:table-cell>
        </table:table-row>
      </table:table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08:55:09.613928334</meta:creation-date>
    <dc:date>2026-01-04T16:16:57.826131617</dc:date>
    <meta:editing-duration>P2DT7H11M53S</meta:editing-duration>
    <meta:editing-cycles>16</meta:editing-cycles>
    <meta:generator>LibreOffice/25.2.7.2$Linux_X86_64 LibreOffice_project/520$Build-2</meta:generator>
    <meta:document-statistic meta:table-count="1" meta:image-count="0" meta:object-count="0" meta:page-count="1" meta:paragraph-count="30" meta:word-count="209" meta:character-count="1428" meta:non-whitespace-character-count="1239"/>
  </office:meta>
</office:document-meta>
</file>