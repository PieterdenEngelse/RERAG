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236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3.082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mart approach — additive, not a rewrite. The existing modes keep working, and Rig becomes one more option you can test side by side. Here's the sketch.</text:p>
      <text:h text:style-name="Heading_20_2" text:outline-level="2">How it fits into the current architecture</text:h>
      <text:p text:style-name="Text_20_body">Your <text:span text:style-name="Source_20_Text">rag_priority</text:span> float (0.0–1.0) maps to named presets. Currently something like:</text:p>
      <text:p text:style-name="Preformatted_20_Text"><text:span text:style-name="Source_20_Text">0.0 <text:s text:c="6"/>→ LLM-only</text:span></text:p>
      <text:p text:style-name="Preformatted_20_Text"><text:span text:style-name="Source_20_Text">0.0-0.4 <text:s text:c="2"/>→ LLM-leaning hybrid</text:span></text:p>
      <text:p text:style-name="Preformatted_20_Text"><text:span text:style-name="Source_20_Text">0.5 <text:s text:c="6"/>→ balanced hybrid <text:s/></text:span></text:p>
      <text:p text:style-name="Preformatted_20_Text"><text:span text:style-name="Source_20_Text">0.6-1.0 <text:s text:c="2"/>→ RAG-leaning hybrid</text:span></text:p>
      <text:p text:style-name="P1"><text:span text:style-name="Source_20_Text">1.0 <text:s text:c="6"/>→ RAG-only</text:span></text:p>
      <text:p text:style-name="Text_20_body">You'd add a separate toggle — not a position on the slider, because Rig mode is qualitatively different (the LLM controls the workflow, not predetermined branching). Think of it as a checkbox or dropdown on the hardware/config page: <text:span text:style-name="Strong_20_Emphasis">Agent Mode: Classic | Rig Agentic</text:span></text:p>
      <text:p text:style-name="Text_20_body">When Classic is selected, <text:span text:style-name="Source_20_Text">rag_priority</text:span> works exactly as now. When Rig Agentic is selected, the agent loop takes over and the LLM decides which tools to call.</text:p>
      <text:h text:style-name="Heading_20_2" text:outline-level="2">The pieces needed</text:h>
      <text:p text:style-name="Text_20_body"><text:span text:style-name="Strong_20_Emphasis">1. Rig tools wrapping your existing services</text:span> — each becomes a <text:span text:style-name="Source_20_Text">struct</text:span> implementing Rig's <text:span text:style-name="Source_20_Text">Tool</text:span> trait:</text:p>
      <text:p text:style-name="Preformatted_20_Text"><text:span text:style-name="Source_20_Text">~/ag/backend/src/rig_tools/</text:span></text:p>
      <text:p text:style-name="Preformatted_20_Text"><text:span text:style-name="Source_20_Text">├── mod.rs</text:span></text:p>
      <text:p text:style-name="Preformatted_20_Text"><text:span text:style-name="Source_20_Text">├── tantivy_search.rs <text:s text:c="3"/>← wraps Retriever::search()</text:span></text:p>
      <text:p text:style-name="Preformatted_20_Text"><text:span text:style-name="Source_20_Text">├── vector_search.rs <text:s text:c="4"/>← wraps Retriever::vector_search()</text:span></text:p>
      <text:p text:style-name="Preformatted_20_Text"><text:span text:style-name="Source_20_Text">├── memory_recall.rs <text:s text:c="4"/>← wraps AgentMemory::recall()</text:span></text:p>
      <text:p text:style-name="Preformatted_20_Text"><text:span text:style-name="Source_20_Text">├── memory_store.rs <text:s text:c="5"/>← wraps AgentMemory::store()</text:span></text:p>
      <text:p text:style-name="Preformatted_20_Text"><text:span text:style-name="Source_20_Text">├── graph_query.rs <text:s text:c="6"/>← wraps petgraph lookups</text:span></text:p>
      <text:p text:style-name="P1"><text:span text:style-name="Source_20_Text">└── llm_generate.rs <text:s text:c="5"/>← direct Ollama/llama-server call (for sub-queries)</text:span></text:p>
      <text:p text:style-name="Text_20_body">Each tool is thin — just typed args in, call your existing code, result out. For example <text:span text:style-name="Source_20_Text">TantivySearchTool</text:span> would take a query string, call <text:span text:style-name="Source_20_Text">retriever.search()</text:span>, return the chunks as a string. All the real logic stays in <text:span text:style-name="Source_20_Text">retriever.rs</text:span>.</text:p>
      <text:p text:style-name="Text_20_body"><text:span text:style-name="Strong_20_Emphasis">2. A Rig agent builder in </text:span><text:span text:style-name="Strong_20_Emphasis"><text:span text:style-name="Source_20_Text">agent.rs</text:span></text:span> — a new function alongside the existing <text:span text:style-name="Source_20_Text">run()</text:span>:</text:p>
      <text:p text:style-name="Preformatted_20_Text"><text:span text:style-name="Source_20_Text">agent.rs:</text:span></text:p>
      <text:p text:style-name="Preformatted_20_Text"><text:span text:style-name="Source_20_Text"><text:s text:c="4"/>pub async fn run() <text:s text:c="10"/>← existing, untouched</text:span></text:p>
      <text:p text:style-name="P1"><text:span text:style-name="Source_20_Text"><text:s text:c="4"/>pub async fn run_rig() <text:s text:c="6"/>← new, Rig-powered path</text:span></text:p>
      <text:p text:style-name="Text_20_body"><text:span text:style-name="Source_20_Text">run_rig()</text:span> constructs the Rig agent with the appropriate provider (Ollama or OpenAI-compatible for llama-server), attaches the tools, injects your system prompt with persona/goals/memories context, and lets Rig loop until the LLM produces a final answer.</text:p>
      <text:p text:style-name="Text_20_body"><text:span text:style-name="Strong_20_Emphasis">3. A dispatch point in the handler</text:span> — where <text:span text:style-name="Source_20_Text">/agent</text:span> or <text:span text:style-name="Source_20_Text">/agent/chat</text:span> decides which path:</text:p>
      <text:p text:style-name="Preformatted_20_Text"><text:span text:style-name="Source_20_Text">match agent_mode {</text:span></text:p>
      <text:p text:style-name="Preformatted_20_Text"><text:span text:style-name="Source_20_Text"><text:s text:c="4"/>AgentMode::Classic =&gt; agent.run(query).await,</text:span></text:p>
      <text:p text:style-name="Preformatted_20_Text"><text:soft-page-break/><text:span text:style-name="Source_20_Text"><text:s text:c="4"/>AgentMode::RigAgentic =&gt; agent.run_rig(query).await,</text:span></text:p>
      <text:p text:style-name="P1"><text:span text:style-name="Source_20_Text">}</text:span></text:p>
      <text:p text:style-name="Text_20_body"><text:span text:style-name="Strong_20_Emphasis">4. A config field</text:span> — <text:span text:style-name="Source_20_Text">agent_mode: AgentMode</text:span> stored in SQLite via <text:span text:style-name="Source_20_Text">param_hardware</text:span> or a new <text:span text:style-name="Source_20_Text">param_agent</text:span> table, exposed on the frontend config page.</text:p>
      <text:h text:style-name="Heading_20_2" text:outline-level="2">What you keep, what chang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Keeps working unchanged</text:p>
            </table:table-cell>
            <table:table-cell table:style-name="Table1.A1" office:value-type="string">
              <text:p text:style-name="Table_20_Heading">New with Rig mode</text:p>
            </table:table-cell>
          </table:table-row>
        </table:table-header-rows>
        <table:table-row>
          <table:table-cell table:style-name="Table1.A1" office:value-type="string">
            <text:p text:style-name="Table_20_Contents">All existing RAG/LLM/Hybrid paths</text:p>
          </table:table-cell>
          <table:table-cell table:style-name="Table1.A1" office:value-type="string">
            <text:p text:style-name="Table_20_Contents">LLM decides tool calls dynamically</text:p>
          </table:table-cell>
        </table:table-row>
        <table:table-row>
          <table:table-cell table:style-name="Table1.A1" office:value-type="string">
            <text:p text:style-name="Table_20_Contents"><text:span text:style-name="Source_20_Text">rag_priority</text:span> slider (Classic mode)</text:p>
          </table:table-cell>
          <table:table-cell table:style-name="Table1.A1" office:value-type="string">
            <text:p text:style-name="Table_20_Contents">Slider ignored in Rig mode</text:p>
          </table:table-cell>
        </table:table-row>
        <table:table-row>
          <table:table-cell table:style-name="Table1.A1" office:value-type="string">
            <text:p text:style-name="Table_20_Contents">Tantivy, ONNX, petgraph internals</text:p>
          </table:table-cell>
          <table:table-cell table:style-name="Table1.A1" office:value-type="string">
            <text:p text:style-name="Table_20_Contents">Same internals, wrapped as Tool impls</text:p>
          </table:table-cell>
        </table:table-row>
        <table:table-row>
          <table:table-cell table:style-name="Table1.A1" office:value-type="string">
            <text:p text:style-name="Table_20_Contents">Shimmytok token counting</text:p>
          </table:table-cell>
          <table:table-cell table:style-name="Table1.A1" office:value-type="string">
            <text:p text:style-name="Table_20_Contents">Used for context budgeting before Rig sends</text:p>
          </table:table-cell>
        </table:table-row>
        <table:table-row>
          <table:table-cell table:style-name="Table1.A1" office:value-type="string">
            <text:p text:style-name="Table_20_Contents">Goals, episodes, reflections, persona</text:p>
          </table:table-cell>
          <table:table-cell table:style-name="Table1.A1" office:value-type="string">
            <text:p text:style-name="Table_20_Contents">Injected into Rig agent preamble</text:p>
          </table:table-cell>
        </table:table-row>
        <table:table-row>
          <table:table-cell table:style-name="Table1.A1" office:value-type="string">
            <text:p text:style-name="Table_20_Contents">Monitoring, observability</text:p>
          </table:table-cell>
          <table:table-cell table:style-name="Table1.A1" office:value-type="string">
            <text:p text:style-name="Table_20_Contents">Rig's OTel spans feed into same pipeline</text:p>
          </table:table-cell>
        </table:table-row>
        <table:table-row>
          <table:table-cell table:style-name="Table1.A1" office:value-type="string">
            <text:p text:style-name="Table_20_Contents">Frontend, Actix routes</text:p>
          </table:table-cell>
          <table:table-cell table:style-name="Table1.A1" office:value-type="string">
            <text:p text:style-name="Table_20_Contents">One new dropdown on config page</text:p>
          </table:table-cell>
        </table:table-row>
      </table:table>
      <text:h text:style-name="Heading_20_2" text:outline-level="2">Installer impact</text:h>
      <text:list text:style-name="L1">
        <text:list-item>
          <text:p text:style-name="P2">Add <text:span text:style-name="Source_20_Text">rig-core</text:span> with <text:span text:style-name="Source_20_Text">features = ["ollama"]</text:span> to backend <text:span text:style-name="Source_20_Text">Cargo.toml</text:span> </text:p>
        </text:list-item>
        <text:list-item>
          <text:p text:style-name="P2">New source directory <text:span text:style-name="Source_20_Text">src/rig_tools/</text:span> </text:p>
        </text:list-item>
        <text:list-item>
          <text:p text:style-name="P2">New <text:span text:style-name="Source_20_Text">AgentMode</text:span> enum field in SQLite config </text:p>
        </text:list-item>
        <text:list-item>
          <text:p text:style-name="P2">Frontend: one dropdown on hardware/config page </text:p>
        </text:list-item>
        <text:list-item>
          <text:p text:style-name="P3">No new system services, ports, or packages </text:p>
        </text:list-item>
      </text:list>
      <text:h text:style-name="Heading_20_2" text:outline-level="2">Concerns to address during implementation</text:h>
      <text:list text:style-name="L2">
        <text:list-item>
          <text:p text:style-name="P4"><text:span text:style-name="Strong_20_Emphasis">Token budget per Rig turn</text:span> — shimmytok counts before each LLM call; if accumulated tool results push past context limit, you need a compaction step (trim oldest tool results, keep the query and latest results) </text:p>
        </text:list-item>
        <text:list-item>
          <text:p text:style-name="P4"><text:span text:style-name="Strong_20_Emphasis">Tool calling model quality</text:span> — not all Q4_K_M models handle tool-call JSON reliably. Would need testing per model. Fallback: if Rig mode fails, fall back to Classic automatically </text:p>
        </text:list-item>
        <text:list-item>
          <text:p text:style-name="P5"><text:span text:style-name="Strong_20_Emphasis">Streaming</text:span> — Rig supports streaming but the tool-call loop means intermediate tool results stream differently than a single-pass RAG response. Frontend would need to handle "thinking..." steps </text:p>
        </text:list-item>
      </text:list>
      <text:p text:style-name="Text_20_body">Want me to produce the concrete implementation starting with the tool wrappers and the <text:span text:style-name="Source_20_Text">run_rig()</text:span> function? I'd want to see the current <text:span text:style-name="Source_20_Text">agent.rs</text:span> run function to map the exact integration point — can you paste the <text:span text:style-name="Source_20_Text">run()</text:span> method signature area and the mode-selection logic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11:32:49.447641126</meta:creation-date>
    <dc:date>2026-04-04T11:33:09.287650969</dc:date>
    <meta:editing-duration>PT21S</meta:editing-duration>
    <meta:editing-cycles>1</meta:editing-cycles>
    <meta:generator>LibreOffice/25.8.5.2$Linux_X86_64 LibreOffice_project/580$Build-2</meta:generator>
    <meta:document-statistic meta:table-count="1" meta:image-count="0" meta:object-count="0" meta:page-count="2" meta:paragraph-count="60" meta:word-count="591" meta:character-count="4017" meta:non-whitespace-character-count="3393"/>
  </office:meta>
</office:document-meta>
</file>