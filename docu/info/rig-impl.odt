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ckend — monitoring/rig_stats.rs (new) <text:s text:c="54"/></text:p>
      <text:p text:style-name="Standard"><text:s text:c="2"/>Atomic counters for agentic calls, fallbacks, tool calls, total ms. Ring buffer (100 entries) </text:p>
      <text:p text:style-name="Standard"><text:s text:c="2"/>for per-session token data. snapshot() derives avg/max tokens, context utilization %, counter </text:p>
      <text:p text:style-name="Standard"><text:s text:c="2"/>type (exact/heuristic). <text:s text:c="70"/></text:p>
      <text:p text:style-name="Standard"><text:s text:c="96"/></text:p>
      <text:p text:style-name="Standard"><text:s text:c="2"/>Backend — rig_tools/*.rs (4 files instrumented) <text:s text:c="44"/></text:p>
      <text:p text:style-name="Standard"><text:s text:c="2"/>Each tool's call() now records a record_tool_execution event (RigSearch, RigMemoryRecall, <text:s text:c="4"/></text:p>
      <text:p text:style-name="Standard"><text:s text:c="2"/>RigMemoryStore, RigGraphSearch) plus calls record_rig_tool_call(). These feed directly into <text:s text:c="2"/></text:p>
      <text:p text:style-name="Standard"><text:s text:c="2"/>the existing Tool Performance chart on the monitor page. <text:s text:c="32"/></text:p>
      <text:p text:style-name="Standard"><text:s text:c="15"/></text:p>
      <text:p text:style-name="Standard"><text:s text:c="2"/>Backend — api/agent_chat.rs (Rig dispatch block) <text:s text:c="45"/></text:p>
      <text:p text:style-name="Standard"><text:s text:c="2"/>- Token count via get_token_counter() before the Rig call; warns at &gt;80% context <text:s text:c="11"/></text:p>
      <text:p text:style-name="Standard"><text:s text:c="2"/>- record_token_usage() called with num_ctx from hardware config <text:s text:c="30"/></text:p>
      <text:p text:style-name="Standard"><text:s text:c="2"/>- On success: record_agentic_call() + record_tool_execution("AgenticSession", ...) <text:s text:c="11"/></text:p>
      <text:p text:style-name="Standard"><text:s text:c="2"/>- On failure: record_agentic_fallback(), falls through to a real Hybrid run instead of <text:s text:c="7"/></text:p>
      <text:p text:style-name="Standard"><text:s text:c="2"/>returning an error string; response includes mode: "agentic_fallback" and fallback_reason <text:s text:c="4"/></text:p>
      <text:p text:style-name="Standard"><text:s text:c="96"/></text:p>
      <text:p text:style-name="Standard"><text:s text:c="2"/>Backend — agent.rs stub <text:s text:c="70"/></text:p>
      <text:p text:style-name="Standard"><text:s text:c="2"/>Agentic path in the sync run_with_mode() now returns a clear "use /agent/stream" message <text:s text:c="5"/></text:p>
      <text:p text:style-name="Standard"><text:s text:c="2"/>instead of "integration pending". <text:s text:c="60"/></text:p>
      <text:p text:style-name="Standard"><text:s text:c="94"/></text:p>
      <text:p text:style-name="Standard"><text:s text:c="2"/>Backend — api/agentic_monitor_routes.rs <text:s text:c="54"/></text:p>
      <text:p text:style-name="Standard"><text:s text:c="2"/>GET /monitoring/agents/rig-stats handler returns the RigStatsSnapshot JSON. Route registered <text:s/></text:p>
      <text:p text:style-name="Standard"><text:s text:c="2"/>in configure_agentic_monitor_routes. <text:s text:c="57"/></text:p>
      <text:p text:style-name="Standard"><text:s text:c="96"/></text:p>
      <text:p text:style-name="Standard"><text:s text:c="2"/>Frontend — api.rs <text:s text:c="74"/></text:p>
      <text:p text:style-name="Standard"><text:s text:c="2"/>RigStatsResponse struct + fetch_rig_stats() function. <text:s text:c="40"/></text:p>
      <text:p text:style-name="Standard"><text:s text:c="96"/></text:p>
      <text:p text:style-name="Standard"><text:s text:c="2"/>Frontend — pages/monitor/agentic.rs <text:s text:c="58"/></text:p>
      <text:p text:style-name="Standard"><text:s text:c="2"/>New "Rig Agentic Mode" section with: <text:s text:c="52"/></text:p>
      <text:p text:style-name="Standard"><text:s text:c="2"/>- 4 stat cards: Total Calls, Fallbacks, Tool Calls, Fallback Rate <text:s text:c="28"/></text:p>
      <text:p text:style-name="Standard"><text:s text:c="2"/>- Context budget bar (teal/yellow/red at 60%/80%) with avg utilization % <text:s text:c="21"/></text:p>
      <text:p text:style-name="Standard"><text:s text:c="2"/>- Avg tokens/session, max tokens, avg session ms <text:s text:c="43"/></text:p>
      <text:p text:style-name="Standard"><text:s text:c="2"/>- Counter type badge (teal = exact GGUF, yellow = heuristic) <text:s text:c="33"/></text:p>
      <text:p text:style-name="Standard"><text:s text:c="2"/>- "No sessions yet" placeholder until first agentic query <text:s text:c="36"/></text:p>
      <text:p text:style-name="Standard"><text:s text:c="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7T08:08:20.065602601</meta:creation-date>
    <dc:date>2026-04-07T08:09:16.130944780</dc:date>
    <meta:editing-duration>PT57S</meta:editing-duration>
    <meta:editing-cycles>1</meta:editing-cycles>
    <meta:generator>LibreOffice/25.8.5.2$Linux_X86_64 LibreOffice_project/580$Build-2</meta:generator>
    <meta:document-statistic meta:table-count="0" meta:image-count="0" meta:object-count="0" meta:page-count="1" meta:paragraph-count="36" meta:word-count="218" meta:character-count="3300" meta:non-whitespace-character-count="1537"/>
  </office:meta>
</office:document-meta>
</file>