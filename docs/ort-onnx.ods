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B00000023C30089A86.png" manifest:media-type="image/png"/>
  <manifest:file-entry manifest:full-path="Pictures/10000000000006DB00000104F18F763F.png" manifest:media-type="image/png"/>
  <manifest:file-entry manifest:full-path="Pictures/10000000000006D70000032E9A752519.png" manifest:media-type="image/png"/>
  <manifest:file-entry manifest:full-path="Pictures/10000000000006FC0000038DECFFBAAC.png" manifest:media-type="image/png"/>
  <manifest:file-entry manifest:full-path="Pictures/100000000000063D000003CEC5275E20.png" manifest:media-type="image/png"/>
  <manifest:file-entry manifest:full-path="Pictures/10000000000004960000004BC5B99CCE.png" manifest:media-type="image/png"/>
  <manifest:file-entry manifest:full-path="Pictures/10000000000006FD000003A6244CFFAB.png" manifest:media-type="image/png"/>
  <manifest:file-entry manifest:full-path="Pictures/10000000000004960000007933462866.png" manifest:media-type="image/png"/>
  <manifest:file-entry manifest:full-path="Pictures/10000000000004B6000002E5179EE248.png" manifest:media-type="image/png"/>
  <manifest:file-entry manifest:full-path="Pictures/10000000000006E900000173FAD9E19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4" draw:name="Image 5" draw:style-name="gr1" draw:text-style-name="P1" svg:width="19.1756in" svg:height="3.8791in" svg:x="0in" svg:y="40in">
            <draw:image xlink:href="Pictures/10000000000006E900000173FAD9E19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>
            <draw:frame draw:z-index="0" draw:name="Image 1" draw:style-name="gr1" draw:text-style-name="P1" svg:width="19.3925in" svg:height="9.7669in" svg:x="0in" svg:y="0in">
              <draw:image xlink:href="Pictures/10000000000006FD000003A6244CFFA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56">
          <table:table-cell/>
        </table:table-row>
        <table:table-row table:style-name="ro1">
          <table:table-cell>
            <draw:frame draw:z-index="1" draw:name="Image 2" draw:style-name="gr1" draw:text-style-name="P1" svg:width="17.311in" svg:height="10.185in" svg:x="0in" svg:y="0in">
              <draw:image xlink:href="Pictures/100000000000063D000003CEC5275E20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58">
          <table:table-cell/>
        </table:table-row>
        <table:table-row table:style-name="ro1">
          <table:table-cell>
            <draw:frame draw:z-index="2" draw:name="Image 3" draw:style-name="gr1" draw:text-style-name="P1" svg:width="19.3815in" svg:height="9.5055in" svg:x="0in" svg:y="0in">
              <draw:image xlink:href="Pictures/10000000000006FC0000038DECFFBAA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54">
          <table:table-cell/>
        </table:table-row>
        <table:table-row table:style-name="ro1">
          <table:table-cell office:value-type="string" calcext:value-type="string">
            <text:p>Add real auto-download (half-day). Wire hf_hub (the crate is already a transitive dep via fastembed) into layout_model.rs, accept LAYOUT_ML_MODEL_ID=owner/repo as a real input, download on <text:s text:c="2"/>first call if not cached, fall through to heuristic on failure. Then the modal copy I wrote becomes truthful and LAYOUT_ML_MODEL_ID works as advertised.</text:p>
          </table:table-cell>
        </table:table-row>
        <table:table-row table:style-name="ro1">
          <table:table-cell/>
        </table:table-row>
        <table:table-row table:style-name="ro1">
          <table:table-cell>
            <draw:frame draw:z-index="3" draw:name="Image 4" draw:style-name="gr1" draw:text-style-name="P1" svg:width="18.9803in" svg:height="8.5122in" svg:x="0in" svg:y="0in">
              <draw:image xlink:href="Pictures/10000000000006D70000032E9A75251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49">
          <table:table-cell/>
        </table:table-row>
        <table:table-row table:style-name="ro1">
          <table:table-cell office:value-type="string" calcext:value-type="string">
            <text:p><text:s text:c="3"/>Two adjacent modals on this same page still violate the rule (same w-[90vw] max-w-2xl max-h-[85vh] overflow-y-auto): the Native PDF Extraction overview modal (~L1893) and layout_model_info_modal <text:s text:c="2"/>(~L2226) — both ones I edited earlier in this session. Want me to fix those too for consistency?</text:p>
          </table:table-cell>
        </table:table-row>
        <table:table-row table:style-name="ro1" table:number-rows-repeated="24">
          <table:table-cell/>
        </table:table-row>
        <table:table-row table:style-name="ro1">
          <table:table-cell>
            <draw:frame draw:z-index="5" draw:name="Image 6" draw:style-name="gr1" draw:text-style-name="P1" svg:width="19.024in" svg:height="2.7185in" svg:x="0in" svg:y="0in">
              <draw:image xlink:href="Pictures/10000000000006DB00000104F18F763F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pp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Chunk embeddings live in Tantivy/rkyv (not FalkorDB), so I can't read them via Cypher. There's no diagnostic embed endpoint anywhere in the API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>
            <draw:frame draw:z-index="0" draw:name="Image 7" draw:style-name="gr1" draw:text-style-name="P1" svg:width="12.726in" svg:height="0.7839in" svg:x="0in" svg:y="0in">
              <draw:image xlink:href="Pictures/10000000000004960000004BC5B99CCE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5">
          <table:table-cell table:number-columns-repeated="16"/>
        </table:table-row>
        <table:table-row table:style-name="ro1">
          <table:table-cell>
            <draw:frame draw:z-index="1" draw:name="Image 8" draw:style-name="gr1" draw:text-style-name="P1" svg:width="13.0728in" svg:height="7.7484in" svg:x="0in" svg:y="0in">
              <draw:image xlink:href="Pictures/10000000000004B6000002E5179EE248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>
            <draw:frame draw:z-index="2" draw:name="Image 9" draw:style-name="gr1" draw:text-style-name="P1" svg:width="12.726in" svg:height="1.265in" svg:x="0in" svg:y="0in">
              <draw:image xlink:href="Pictures/1000000000000496000000793346286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15"/>
          <table:table-cell>
            <draw:frame draw:z-index="3" draw:name="Image 10" draw:style-name="gr1" draw:text-style-name="P1" svg:width="13.0075in" svg:height="5.9815in" svg:x="0in" svg:y="0in">
              <draw:image xlink:href="Pictures/10000000000004B00000023C30089A8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6">
          <table:table-cell table:number-columns-repeated="16"/>
        </table:table-row>
        <table:table-row table:style-name="ro1">
          <table:table-cell office:value-type="string" calcext:value-type="string">
            <text:p><text:s text:c="2"/>- Fragmented + threshold → routes to Pointer hydration regardless of high_confiden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2"/>- Non-fragmented + high-confidence → stric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2"/>- Non-fragmented + low-confidence → hybri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2"/>- Boundary at exactly gap == threshold → inclusive/exclusive convention lock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2"/>- All chunks untracked → does NOT trigger; falls through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0">00/00/0000</text:date>, <text:time style:data-style-name="N2" text:time-value="12:27:52.133397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5T07:26:15.111553461</meta:creation-date>
    <meta:generator>LibreOffice/25.8.5.2$Linux_X86_64 LibreOffice_project/580$Build-2</meta:generator>
    <dc:date>2026-05-30T12:38:14.539071290</dc:date>
    <meta:editing-duration>PT11H42M37S</meta:editing-duration>
    <meta:editing-cycles>8</meta:editing-cycles>
    <meta:document-statistic meta:table-count="2" meta:cell-count="8" meta:object-count="10"/>
  </office:meta>
</office:document-meta>
</file>