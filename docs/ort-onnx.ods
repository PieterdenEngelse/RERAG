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6DB00000104F18F763F.png" manifest:media-type="image/png"/>
  <manifest:file-entry manifest:full-path="Pictures/10000000000006D70000032E9A752519.png" manifest:media-type="image/png"/>
  <manifest:file-entry manifest:full-path="Pictures/10000000000006FC0000038DECFFBAAC.png" manifest:media-type="image/png"/>
  <manifest:file-entry manifest:full-path="Pictures/100000000000063D000003CEC5275E20.png" manifest:media-type="image/png"/>
  <manifest:file-entry manifest:full-path="Pictures/10000000000006FD000003A6244CFFAB.png" manifest:media-type="image/png"/>
  <manifest:file-entry manifest:full-path="Pictures/10000000000006E900000173FAD9E1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4" draw:name="Image 5" draw:style-name="gr1" draw:text-style-name="P1" svg:width="19.1756in" svg:height="3.8791in" svg:x="0in" svg:y="40in">
            <draw:image xlink:href="Pictures/10000000000006E900000173FAD9E19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19.3925in" svg:height="9.7669in" svg:x="0in" svg:y="0in">
              <draw:image xlink:href="Pictures/10000000000006FD000003A6244CFFA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6">
          <table:table-cell/>
        </table:table-row>
        <table:table-row table:style-name="ro1">
          <table:table-cell>
            <draw:frame draw:z-index="1" draw:name="Image 2" draw:style-name="gr1" draw:text-style-name="P1" svg:width="17.311in" svg:height="10.185in" svg:x="0in" svg:y="0in">
              <draw:image xlink:href="Pictures/100000000000063D000003CEC5275E2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8">
          <table:table-cell/>
        </table:table-row>
        <table:table-row table:style-name="ro1">
          <table:table-cell>
            <draw:frame draw:z-index="2" draw:name="Image 3" draw:style-name="gr1" draw:text-style-name="P1" svg:width="19.3815in" svg:height="9.5055in" svg:x="0in" svg:y="0in">
              <draw:image xlink:href="Pictures/10000000000006FC0000038DECFFBAA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Add real auto-download (half-day). Wire hf_hub (the crate is already a transitive dep via fastembed) into layout_model.rs, accept LAYOUT_ML_MODEL_ID=owner/repo as a real input, download on <text:s text:c="2"/>first call if not cached, fall through to heuristic on failure. Then the modal copy I wrote becomes truthful and LAYOUT_ML_MODEL_ID works as advertised.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3" draw:name="Image 4" draw:style-name="gr1" draw:text-style-name="P1" svg:width="18.9803in" svg:height="8.5122in" svg:x="0in" svg:y="0in">
              <draw:image xlink:href="Pictures/10000000000006D70000032E9A75251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49">
          <table:table-cell/>
        </table:table-row>
        <table:table-row table:style-name="ro1">
          <table:table-cell office:value-type="string" calcext:value-type="string">
            <text:p><text:s text:c="3"/>Two adjacent modals on this same page still violate the rule (same w-[90vw] max-w-2xl max-h-[85vh] overflow-y-auto): the Native PDF Extraction overview modal (~L1893) and layout_model_info_modal <text:s text:c="2"/>(~L2226) — both ones I edited earlier in this session. Want me to fix those too for consistency?</text:p>
          </table:table-cell>
        </table:table-row>
        <table:table-row table:style-name="ro1" table:number-rows-repeated="24">
          <table:table-cell/>
        </table:table-row>
        <table:table-row table:style-name="ro1">
          <table:table-cell>
            <draw:frame draw:z-index="5" draw:name="Image 6" draw:style-name="gr1" draw:text-style-name="P1" svg:width="19.024in" svg:height="2.7185in" svg:x="0in" svg:y="0in">
              <draw:image xlink:href="Pictures/10000000000006DB00000104F18F763F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10:09:41.440839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07:26:15.111553461</meta:creation-date>
    <meta:generator>LibreOffice/25.8.5.2$Linux_X86_64 LibreOffice_project/580$Build-2</meta:generator>
    <dc:date>2026-05-26T10:42:22.196351160</dc:date>
    <meta:editing-duration>PT11H10M39S</meta:editing-duration>
    <meta:editing-cycles>5</meta:editing-cycles>
    <meta:document-statistic meta:table-count="1" meta:cell-count="2" meta:object-count="6"/>
  </office:meta>
</office:document-meta>
</file>