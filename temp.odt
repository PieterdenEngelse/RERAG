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0.1174in" table:align="left"/>
    </style:style>
    <style:style style:name="Table1.A" style:family="table-column">
      <style:table-column-properties style:column-width="0.1174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Text_20_body">
      <style:paragraph-properties fo:margin-left="0in" fo:margin-right="0in" fo:text-indent="0in" style:auto-text-indent="false"/>
    </style:style>
    <style:style style:name="P2" style:family="paragraph" style:parent-style-name="Table_20_Contents">
      <style:text-properties fo:font-size="2pt" style:font-size-asian="2pt" style:font-size-complex="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e <text:span text:style-name="Strong_20_Emphasis">repeat_penalty</text:span> parameter is a control that discourages an LLM from repeating the same words or phrases too often. It works by <text:span text:style-name="Strong_20_Emphasis">lowering the probability of tokens that have already appeared in the generated text</text:span>, making the model less likely to pick them again.</text:p>
      <text:p text:style-name="P1">When the model is about to choose the next token, it looks at all possible tokens and their probabilities. If repeat_penalty is active, any token that has already been used gets its score pushed down before sampling. The more often a token has appeared, the stronger the penalty becomes. This doesn’t forbid repetition entirely, but it makes the model prefer new words unless repeating something is genuinely the best choice. A low penalty keeps the text natural while reducing loops; a high penalty forces the model to avoid repeating itself, sometimes at the cost of coherence.</text:p>
      <text:p text:style-name="P1"/>
      <table:table table:name="Table1" table:style-name="Table1">
        <table:table-column table:style-name="Table1.A"/>
        <table:table-row>
          <table:table-cell table:style-name="Table1.A1" office:value-type="string">
            <text:p text:style-name="P2"/>
          </table:table-cell>
        </table:table-row>
      </table:table>
      <text:p text:style-name="Text_20_body">Now I need to update the <text:span text:style-name="Source_20_Text">on_keypress</text:span> handler as well (it has duplicate logic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28T09:27:41.422917758</meta:creation-date>
    <dc:date>2026-01-05T08:19:27.231806311</dc:date>
    <meta:editing-duration>P1DT3H59M23S</meta:editing-duration>
    <meta:editing-cycles>7</meta:editing-cycles>
    <meta:generator>LibreOffice/25.2.7.2$Linux_X86_64 LibreOffice_project/520$Build-2</meta:generator>
    <meta:document-statistic meta:table-count="1" meta:image-count="0" meta:object-count="0" meta:page-count="1" meta:paragraph-count="3" meta:word-count="154" meta:character-count="919" meta:non-whitespace-character-count="768"/>
  </office:meta>
</office:document-meta>
</file>