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Missing tokenizer → yellow, soft degradation <text:s text:c="53"/></text:p>
      <text:p text:style-name="Standard"><text:s text:c="2"/>The embedder still initializes and runs, but switches to SimpleTokenizer: a fallback that maps <text:s text:c="3"/></text:p>
      <text:p text:style-name="Standard"><text:s text:c="2"/>words to IDs via seahash hash instead of using the model's trained vocabulary. The .onnx file runs</text:p>
      <text:p text:style-name="Standard"><text:s text:c="3"/>fine; the inputs fed to it are just wrong — word-level hashes instead of the sub-word BPE tokens</text:p>
      <text:p text:style-name="Standard"><text:s text:c="2"/>the model was actually trained on. Embeddings are produced but are lower quality. <text:s text:c="16"/></text:p>
      <text:p text:style-name="Standard"><text:s text:c="60"/></text:p>
      <text:p text:style-name="Standard"><text:s text:c="2"/>So ○ tokenizer (yellow) means: the system is running but every embedding is degraded — semantic <text:s text:c="2"/></text:p>
      <text:p text:style-name="Standard"><text:s text:c="2"/>similarity scores will be meaningfully worse because the token IDs don't match the model's</text:p>
      <text:p text:style-name="Standard">vocabulary.</text:p>
      <text:p text:style-name="Standard"/>
      <text:p text:style-name="Standard"><text:s/>Why they can diverge:</text:p>
      <text:p text:style-name="Standard"><text:s text:c="2"/>A user might download only the .onnx weights (model file exists) but skip the tokenizer.json, or</text:p>
      <text:p text:style-name="Standard"><text:s text:c="2"/>vice versa when manually staging files. The two indicators make that split state visible rather</text:p>
      <text:p text:style-name="Standard">than just showing a single "ready/not ready" flag.</text:p>
      <text:p text:style-name="Standard"/>
      <text:p text:style-name="Standard">The ONNX model receives token IDs it was never trained on — seahash(word) % 29522</text:p>
      <text:p text:style-name="Standard"><text:s text:c="3"/>instead of the actual BPE vocabulary — so the attention patterns and final embeddings are</text:p>
      <text:p text:style-name="Standard"><text:s text:c="2"/>essentially noise relative to what the model expects. Retrieval still works mechanically, but <text:s text:c="4"/></text:p>
      <text:p text:style-name="Standard"><text:s text:c="2"/>cosine similarity between chunks becomes unreliable, which means search ranking degrades silently</text:p>
      <text:p text:style-name="Standard">with no error surfaced to the user.</text:p>
      <text:p text:style-name="Standard"/>
      <text:p text:style-name="Standard"><text:s text:c="17"/></text:p>
      <text:p text:style-name="Standard">● "30k+ subword tokens with their merge rules" was imprecise. BGE and MiniLM are BERT-based, so they</text:p>
      <text:p text:style-name="Standard"><text:s text:c="3"/>use WordPiece, not BPE. <text:s text:c="73"/></text:p>
      <text:p text:style-name="Standard"><text:s text:c="100"/></text:p>
      <text:p text:style-name="Standard"><text:s text:c="2"/>WordPiece doesn't store merge rules. The file contains: <text:s text:c="42"/></text:p>
      <text:p text:style-name="Standard"><text:s text:c="100"/></text:p>
      <text:p text:style-name="Standard"><text:s text:c="2"/>- Vocabulary — 30,522 entries mapping token string → integer ID. Subwords are prefixed with ## <text:s text:c="3"/></text:p>
      <text:p text:style-name="Standard"><text:s text:c="2"/>(e.g. ##ing, ##ed). This is the bulk of the file size. <text:s text:c="3"/></text:p>
      <text:p text:style-name="Standard"><text:s text:c="2"/>- Normalizer — BertNormalizer: clean text (strip control chars), handle Chinese chars (insert <text:s text:c="4"/></text:p>
      <text:p text:style-name="Standard"><text:s text:c="2"/>spaces around CJK), lowercase (false for BGE), strip accents (null = model-dependent) <text:s text:c="12"/></text:p>
      <text:p text:style-name="Standard"><text:s text:c="2"/>- Pre-tokenizer — BertPreTokenizer: splits on whitespace and punctuation boundaries before vocab</text:p>
      <text:p text:style-name="Standard"><text:s text:c="2"/>lookup <text:s text:c="91"/></text:p>
      <text:p text:style-name="Standard"><text:s text:c="2"/>- Post-processor — BertProcessing: wraps every encoded sequence with [CLS] (id 101) at the start</text:p>
      <text:p text:style-name="Standard"><text:s text:c="2"/>and [SEP] (id 102) at the end — these are the tokens the model was trained to expect <text:s text:c="13"/></text:p>
      <text:p text:style-name="Standard"><text:s text:c="2"/>- Special tokens — [PAD] (0), [UNK] (100), [CLS] (101), [SEP] (102), [MASK] (103)</text:p>
      <text:p text:style-name="Standard"><text:s text:c="100"/></text:p>
      <text:p text:style-name="Standard"><text:s text:c="2"/>The SimpleTokenizer fallback bypasses all of this — no normalization, no ## subword splitting, no </text:p>
      <text:p text:style-name="Standard"><text:s text:c="2"/>[CLS]/[SEP] wrapping, and token IDs from seahash % 29522 instead of the actual vocabulary. The <text:s text:c="3"/></text:p>
      <text:p text:style-name="Standard"><text:s text:c="2"/>model receives inputs that don't resemble anything it saw during training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08:58:40.932571979</meta:creation-date>
    <meta:generator>LibreOffice/25.8.5.2$Linux_X86_64 LibreOffice_project/580$Build-2</meta:generator>
    <dc:date>2026-04-14T09:35:56.742468148</dc:date>
    <meta:editing-duration>PT37M15S</meta:editing-duration>
    <meta:editing-cycles>3</meta:editing-cycles>
    <meta:document-statistic meta:table-count="0" meta:image-count="0" meta:object-count="0" meta:page-count="1" meta:paragraph-count="37" meta:word-count="375" meta:character-count="3167" meta:non-whitespace-character-count="2044"/>
  </office:meta>
</office:document-meta>
</file>