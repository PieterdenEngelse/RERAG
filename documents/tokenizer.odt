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paragraph-rsid="000e2950"/>
    </style:style>
    <style:style style:name="P6" style:family="paragraph" style:parent-style-name="Text_20_body" style:list-style-name="L4"/>
    <style:style style:name="P7" style:family="paragraph" style:parent-style-name="Text_20_body" style:list-style-name="L5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>
      <style:paragraph-properties fo:margin-top="0in" fo:margin-bottom="0in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>
      <style:paragraph-properties fo:margin-top="0in" fo:margin-bottom="0in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9">
      <style:paragraph-properties fo:margin-top="0in" fo:margin-bottom="0in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10">
      <style:paragraph-properties fo:margin-top="0in" fo:margin-bottom="0in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1">
      <style:paragraph-properties fo:margin-top="0in" fo:margin-bottom="0in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2">
      <style:paragraph-properties fo:margin-top="0in" fo:margin-bottom="0in" style:contextual-spacing="false"/>
    </style:style>
    <style:style style:name="P21" style:family="paragraph" style:parent-style-name="Text_20_body" style:list-style-name="L12"/>
    <style:style style:name="T1" style:family="text">
      <style:text-properties officeooo:rsid="000cb0d6"/>
    </style:style>
    <style:style style:name="T2" style:family="text">
      <style:text-properties officeooo:rsid="000e295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kenizers <text:span text:style-name="T1">are</text:span> basically <text:span text:style-name="Emphasis">the interface layer</text:span> between raw human data and any model that expects discrete symbols. That opens up a whole ecosystem of use cases.</text:p>
      <text:p text:style-name="Text_20_body"/>
      <text:p text:style-name="Horizontal_20_Line"/>
      <text:h text:style-name="Heading_20_3" text:outline-level="3"><text:s/>1. <text:span text:style-name="Strong_20_Emphasis">Compression &amp; Storage Optimization</text:span></text:h>
      <text:p text:style-name="Text_20_body">Tokenizers act as domain‑specific compressors.</text:p>
      <text:list text:style-name="L1">
        <text:list-item>
          <text:p text:style-name="P1"><text:span text:style-name="Strong_20_Emphasis">Lossless text compression</text:span> <text:line-break/>BPE/Unigram tokenizers often outperform gzip on natural language because they exploit linguistic structure.<text:line-break/>Useful for: log storage, telemetry, chat archives, dataset deduplication.</text:p>
        </text:list-item>
        <text:list-item>
          <text:p text:style-name="P1"><text:span text:style-name="Strong_20_Emphasis">Embedding store compression</text:span> <text:line-break/>If you store tokenized text instead of raw strings, you reduce RAM/SSD footprint in vector DBs or graph stores.</text:p>
        </text:list-item>
        <text:list-item>
          <text:p text:style-name="P1"><text:span text:style-name="Strong_20_Emphasis">On‑device model deployment</text:span> <text:line-break/>Smaller vocabularies → smaller embedding matrices → smaller models.</text:p>
        </text:list-item>
      </text:list>
      <text:p text:style-name="Horizontal_20_Line"/>
      <text:h text:style-name="Heading_20_3" text:outline-level="3"><text:s/>2. <text:span text:style-name="Strong_20_Emphasis">Data Cleaning &amp; Normalization Pipelines</text:span></text:h>
      <text:p text:style-name="Text_20_body">Tokenizers are often the <text:span text:style-name="Emphasis">first canonicalization step</text:span> in any ML or analytics pipeline.</text:p>
      <text:list text:style-name="L2">
        <text:list-item>
          <text:p text:style-name="P2">Normalizing Unicode, accents, punctuation </text:p>
        </text:list-item>
        <text:list-item>
          <text:p text:style-name="P2">Splitting mixed‑language text </text:p>
        </text:list-item>
        <text:list-item>
          <text:p text:style-name="P2">Detecting malformed sequences </text:p>
        </text:list-item>
        <text:list-item>
          <text:p text:style-name="P3">Identifying out‑of‑vocabulary patterns (useful for anomaly detection) </text:p>
        </text:list-item>
      </text:list>
      <text:p text:style-name="Text_20_body">This is why tokenizers show up in ETL pipelines even when no LLM is involved.</text:p>
      <text:p text:style-name="Horizontal_20_Line"/>
      <text:h text:style-name="Heading_20_3" text:outline-level="3">3. <text:span text:style-name="Strong_20_Emphasis">Security &amp; Filtering</text:span></text:h>
      <text:p text:style-name="Text_20_body">Tokenization is a surprisingly strong tool for security.</text:p>
      <text:list text:style-name="L3">
        <text:list-item>
          <text:p text:style-name="P4"><text:span text:style-name="Strong_20_Emphasis">Prompt injection detection</text:span> <text:line-break/>Certain attack patterns produce distinctive token sequences (e.g., repeated control tokens, weird Unicode).</text:p>
        </text:list-item>
        <text:list-item>
          <text:p text:style-name="P4"><text:span text:style-name="Strong_20_Emphasis">PII detection</text:span> <text:line-break/>Phone numbers, emails, IBANs, etc. map to predictable token patterns.</text:p>
        </text:list-item>
        <text:list-item>
          <text:p text:style-name="P4"><text:span text:style-name="Strong_20_Emphasis">Malware / code anomaly detection</text:span> <text:line-break/>Tokenizers for code (e.g., tiktoken‑style) reveal suspicious patterns in source code or logs.</text:p>
        </text:list-item>
      </text:list>
      <text:p text:style-name="Horizontal_20_Line"/>
      <text:h text:style-name="Heading_20_3" text:outline-level="3"><text:soft-page-break/>4. <text:span text:style-name="Strong_20_Emphasis">Search &amp; IR Beyond RAG</text:span></text:h>
      <text:p text:style-name="P5">Tokenizers are core to classical IR <text:span text:style-name="T2">(</text:span>the whole family of search engines that predate neural models: Boolean retrieval, vector‑space models, TF‑IDF, BM25, inverted indexes, etc.<text:span text:style-name="T2">) </text:span>systems too. Modern tokenizers (BPE, WordPiece, SentencePiece) break words into <text:span text:style-name="Strong_20_Emphasis">subwords</text:span> to handle morphology and OOV words. Classical IR tokenizers were <text:span text:style-name="Strong_20_Emphasis">word-level</text:span>, not subword-level.</text:p>
      <text:list text:style-name="L4">
        <text:list-item>
          <text:p text:style-name="P6"><text:span text:style-name="Strong_20_Emphasis">BM25 / sparse retrieval</text:span> <text:line-break/>Tokenization defines the term space.<text:line-break/>Modern hybrid search uses LLM tokenizers to unify sparse + dense retrieval.</text:p>
        </text:list-item>
        <text:list-item>
          <text:p text:style-name="P6"><text:span text:style-name="Strong_20_Emphasis">Query rewriting</text:span> <text:line-break/>Token‑level stats help detect synonyms, multi‑word expressions, and segmentation errors.</text:p>
        </text:list-item>
        <text:list-item>
          <text:p text:style-name="P6"><text:span text:style-name="Strong_20_Emphasis">Index compression</text:span> <text:line-break/>Token IDs compress better than raw strings in inverted indexes.</text:p>
        </text:list-item>
      </text:list>
      <text:p text:style-name="Horizontal_20_Line"/>
      <text:h text:style-name="Heading_20_3" text:outline-level="3">🧩 5. <text:span text:style-name="Strong_20_Emphasis">Code Intelligence</text:span></text:h>
      <text:p text:style-name="Text_20_body">For code, tokenizers are essential even outside LLMs.</text:p>
      <text:list text:style-name="L5">
        <text:list-item>
          <text:p text:style-name="P7">Static analysis </text:p>
        </text:list-item>
        <text:list-item>
          <text:p text:style-name="P7">AST reconstruction </text:p>
        </text:list-item>
        <text:list-item>
          <text:p text:style-name="P7">Code similarity detection </text:p>
        </text:list-item>
        <text:list-item>
          <text:p text:style-name="P7">Clone detection </text:p>
        </text:list-item>
        <text:list-item>
          <text:p text:style-name="P8">Vulnerability pattern mining </text:p>
        </text:list-item>
      </text:list>
      <text:p text:style-name="Text_20_body">Many code tools use tokenization as a preprocessing step before graph‑based or symbolic analysis.</text:p>
      <text:p text:style-name="Horizontal_20_Line"/>
      <text:h text:style-name="Heading_20_3" text:outline-level="3">🧩 6. <text:span text:style-name="Strong_20_Emphasis">Speech, OCR, and Multimodal Pipelines</text:span></text:h>
      <text:p text:style-name="Text_20_body">Tokenizers bridge raw signals → text → model input.</text:p>
      <text:list text:style-name="L6">
        <text:list-item>
          <text:p text:style-name="P9"><text:span text:style-name="Strong_20_Emphasis">ASR post‑processing</text:span> <text:line-break/>Tokenizers help segment raw ASR output into meaningful units.</text:p>
        </text:list-item>
        <text:list-item>
          <text:p text:style-name="P9"><text:span text:style-name="Strong_20_Emphasis">OCR cleanup</text:span> <text:line-break/>Tokenization reveals segmentation errors, ligature issues, or hallucinated characters.</text:p>
        </text:list-item>
        <text:list-item>
          <text:p text:style-name="P9"><text:span text:style-name="Strong_20_Emphasis">Multimodal alignment</text:span> <text:line-break/>Vision‑language models align image regions to token sequences.</text:p>
        </text:list-item>
      </text:list>
      <text:p text:style-name="Horizontal_20_Line"/>
      <text:h text:style-name="Heading_20_3" text:outline-level="3">🧩 7. <text:span text:style-name="Strong_20_Emphasis">Dataset Analytics &amp; Quality Control</text:span></text:h>
      <text:p text:style-name="Text_20_body">Tokenizers give you a structured view of your corpus.</text:p>
      <text:list text:style-name="L7">
        <text:list-item>
          <text:p text:style-name="P10"><text:soft-page-break/>Token distribution analysis </text:p>
        </text:list-item>
        <text:list-item>
          <text:p text:style-name="P10">Detecting domain drift </text:p>
        </text:list-item>
        <text:list-item>
          <text:p text:style-name="P10">Identifying rare or harmful patterns </text:p>
        </text:list-item>
        <text:list-item>
          <text:p text:style-name="P10">Measuring dataset entropy </text:p>
        </text:list-item>
        <text:list-item>
          <text:p text:style-name="P11">Detecting duplicates via token‑level hashing </text:p>
        </text:list-item>
      </text:list>
      <text:p text:style-name="Text_20_body">This is crucial for training data curation.</text:p>
      <text:p text:style-name="Horizontal_20_Line"/>
      <text:h text:style-name="Heading_20_3" text:outline-level="3"><text:s/>8. <text:span text:style-name="Strong_20_Emphasis">Model Evaluation &amp; Benchmarking</text:span></text:h>
      <text:p text:style-name="Text_20_body">Tokenization affects evaluation metrics.</text:p>
      <text:list text:style-name="L8">
        <text:list-item>
          <text:p text:style-name="P12">Perplexity is computed over tokens </text:p>
        </text:list-item>
        <text:list-item>
          <text:p text:style-name="P12">Tokenization affects BLEU/ROUGE scores </text:p>
        </text:list-item>
        <text:list-item>
          <text:p text:style-name="P13">Token boundaries influence error analysis </text:p>
        </text:list-item>
      </text:list>
      <text:p text:style-name="Text_20_body">Researchers often run multiple tokenizers to compare model behavior.</text:p>
      <text:p text:style-name="Horizontal_20_Line"/>
      <text:h text:style-name="Heading_20_3" text:outline-level="3"><text:s/>9. <text:span text:style-name="Strong_20_Emphasis">Custom DSLs &amp; Domain‑Specific Models</text:span></text:h>
      <text:p text:style-name="Text_20_body">Tokenizers are used to define the “language” of:</text:p>
      <text:list text:style-name="L9">
        <text:list-item>
          <text:p text:style-name="P14">SQL variants </text:p>
        </text:list-item>
        <text:list-item>
          <text:p text:style-name="P14">Robotics command languages </text:p>
        </text:list-item>
        <text:list-item>
          <text:p text:style-name="P14">Game scripting languages </text:p>
        </text:list-item>
        <text:list-item>
          <text:p text:style-name="P14">Financial transaction logs </text:p>
        </text:list-item>
        <text:list-item>
          <text:p text:style-name="P15">Medical coding systems (ICD, SNOMED) </text:p>
        </text:list-item>
      </text:list>
      <text:p text:style-name="Text_20_body">A tokenizer becomes the grammar boundary for the domain.</text:p>
      <text:p text:style-name="Horizontal_20_Line"/>
      <text:h text:style-name="Heading_20_3" text:outline-level="3">10. <text:span text:style-name="Strong_20_Emphasis">Privacy &amp; Federated Learning</text:span></text:h>
      <text:p text:style-name="Text_20_body">Tokenizers help with:</text:p>
      <text:list text:style-name="L10">
        <text:list-item>
          <text:p text:style-name="P16"><text:span text:style-name="Strong_20_Emphasis">Local differential privacy</text:span> <text:line-break/>Token‑level noise injection </text:p>
        </text:list-item>
        <text:list-item>
          <text:p text:style-name="P16"><text:span text:style-name="Strong_20_Emphasis">Federated text learning</text:span> <text:line-break/>Tokenization ensures consistent vocab across devices </text:p>
        </text:list-item>
        <text:list-item>
          <text:p text:style-name="P17"><text:span text:style-name="Strong_20_Emphasis">Sensitive token masking</text:span> <text:line-break/>Before sending data to a server or model </text:p>
        </text:list-item>
      </text:list>
      <text:p text:style-name="Horizontal_20_Line"/>
      <text:h text:style-name="Heading_20_3" text:outline-level="3"><text:soft-page-break/><text:s/>11. <text:span text:style-name="Strong_20_Emphasis">Token‑Level Feature Engineering</text:span></text:h>
      <text:p text:style-name="Text_20_body">Even outside deep learning:</text:p>
      <text:list text:style-name="L11">
        <text:list-item>
          <text:p text:style-name="P18">Logistic regression on token n‑grams </text:p>
        </text:list-item>
        <text:list-item>
          <text:p text:style-name="P18">Token‑level TF‑IDF </text:p>
        </text:list-item>
        <text:list-item>
          <text:p text:style-name="P18">Token‑based clustering </text:p>
        </text:list-item>
        <text:list-item>
          <text:p text:style-name="P19">Topic modeling (LDA, NMF) </text:p>
        </text:list-item>
      </text:list>
      <text:p text:style-name="Text_20_body">Tokenizers are the foundation of classical NLP.</text:p>
      <text:p text:style-name="Horizontal_20_Line"/>
      <text:h text:style-name="Heading_20_3" text:outline-level="3">12. <text:span text:style-name="Strong_20_Emphasis">Graph Construction </text:span></text:h>
      <text:p text:style-name="Text_20_body">Tokenizers help build:</text:p>
      <text:list text:style-name="L12">
        <text:list-item>
          <text:p text:style-name="P20">Token co‑occurrence graphs </text:p>
        </text:list-item>
        <text:list-item>
          <text:p text:style-name="P20">Token‑sentence bipartite graphs </text:p>
        </text:list-item>
        <text:list-item>
          <text:p text:style-name="P20">Token‑topic graphs </text:p>
        </text:list-item>
        <text:list-item>
          <text:p text:style-name="P21">Token‑embedding similarity graphs </text:p>
        </text:list-item>
      </text:list>
      <text:p text:style-name="Text_20_body">Useful for GraphRAG, clustering, and summary‑first retrieval.</text:p>
      <text:p text:style-name="Horizontal_20_Line"/>
      <text:h text:style-name="Heading_20_2" text:outline-level="2"><text:s/>The meta‑point</text:h>
      <text:p text:style-name="Text_20_body">Tokenizers are not just “LLM plumbing.”<text:line-break/>They’re <text:span text:style-name="Strong_20_Emphasis">the universal adapter</text:span> between raw human data and symbolic computation.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09:57:09.657337468</meta:creation-date>
    <meta:generator>LibreOffice/25.8.5.2$Linux_X86_64 LibreOffice_project/580$Build-2</meta:generator>
    <dc:date>2026-04-14T11:22:54.536065108</dc:date>
    <meta:editing-duration>PT24M56S</meta:editing-duration>
    <meta:editing-cycles>3</meta:editing-cycles>
    <meta:document-statistic meta:table-count="0" meta:image-count="0" meta:object-count="0" meta:page-count="4" meta:paragraph-count="79" meta:word-count="653" meta:character-count="4525" meta:non-whitespace-character-count="3941"/>
  </office:meta>
</office:document-meta>
</file>