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319in" table:align="left"/>
    </style:style>
    <style:style style:name="Table1.A" style:family="table-column">
      <style:table-column-properties style:column-width="3.084in"/>
    </style:style>
    <style:style style:name="Table1.B" style:family="table-column">
      <style:table-column-properties style:column-width="2.447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" style:family="paragraph" style:parent-style-name="Horizontal_20_Line">
      <style:paragraph-properties fo:margin-top="0in" fo:margin-bottom="0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" style:family="paragraph" style:parent-style-name="Heading_20_2">
      <style:paragraph-properties fo:margin-top="0in" fo:margin-bottom="0.1965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5" style:family="paragraph" style:parent-style-name="Text_20_body" style:list-style-name="L1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6" style:family="paragraph" style:parent-style-name="Quotation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8" style:family="paragraph" style:parent-style-name="Text_20_body" style:list-style-name="L2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9" style:family="paragraph" style:parent-style-name="Heading_20_3">
      <style:paragraph-properties fo:margin-top="0in" fo:margin-bottom="0.1965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1" style:family="paragraph" style:parent-style-name="Text_20_body" style:list-style-name="L3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3" style:family="paragraph" style:parent-style-name="Text_20_body" style:list-style-name="L4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5" style:family="paragraph" style:parent-style-name="Text_20_body" style:list-style-name="L5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7" style:family="paragraph" style:parent-style-name="Text_20_body" style:list-style-name="L6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8" style:family="paragraph" style:parent-style-name="Heading_20_1">
      <style:paragraph-properties fo:margin-top="0in" fo:margin-bottom="0.1965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9" style:family="paragraph" style:parent-style-name="Text_20_body" style:list-style-name="L7">
      <style:paragraph-properties fo:margin-top="0in" fo:margin-bottom="0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0" style:family="paragraph" style:parent-style-name="Text_20_body" style:list-style-name="L7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1" style:family="paragraph" style:parent-style-name="Text_20_body" style:list-style-name="L8">
      <style:paragraph-properties fo:margin-top="0in" fo:margin-bottom="0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2" style:family="paragraph" style:parent-style-name="Text_20_body" style:list-style-name="L8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3" style:family="paragraph" style:parent-style-name="Text_20_body" style:list-style-name="L9">
      <style:paragraph-properties fo:margin-top="0in" fo:margin-bottom="0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4" style:family="paragraph" style:parent-style-name="Text_20_body" style:list-style-name="L9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5" style:family="paragraph" style:parent-style-name="Text_20_body" style:list-style-name="L10">
      <style:paragraph-properties fo:margin-top="0in" fo:margin-bottom="0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6" style:family="paragraph" style:parent-style-name="Text_20_body" style:list-style-name="L10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7" style:family="paragraph" style:parent-style-name="Text_20_body" style:list-style-name="L11">
      <style:paragraph-properties fo:margin-top="0in" fo:margin-bottom="0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8" style:family="paragraph" style:parent-style-name="Text_20_body" style:list-style-name="L11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9" style:family="paragraph" style:parent-style-name="Text_20_body" style:list-style-name="L12">
      <style:paragraph-properties fo:margin-top="0in" fo:margin-bottom="0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0" style:family="paragraph" style:parent-style-name="Text_20_body" style:list-style-name="L12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1" style:family="paragraph" style:parent-style-name="Text_20_body" style:list-style-name="L13">
      <style:paragraph-properties fo:margin-top="0in" fo:margin-bottom="0in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2" style:family="paragraph" style:parent-style-name="Text_20_body" style:list-style-name="L13">
      <style:text-properties style:font-name="Liberation Mono" fo:font-size="10pt" style:font-name-asian="Noto Sans Mono CJK SC" style:font-size-asian="10pt" style:font-name-complex="Liberation Mono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’s the short, clean answer you’re looking for — and then I’ll expand a bit so you can plug it straight into your mental model of GGUF + Shimmytok + Rust pipelines.</text:p>
      <text:p text:style-name="P2"/>
      <text:h text:style-name="P3" text:outline-level="2">🔤 What “BPE” means in this context</text:h>
      <text:p text:style-name="P1"><text:span text:style-name="Strong_20_Emphasis">BPE = Byte Pair Encoding</text:span>, a subword tokenization algorithm used by many LLMs (LLaMA, Mistral, Gemma, etc.).<text:line-break/>In GGUF models, the tokenizer is stored <text:span text:style-name="Emphasis">inside the GGUF file</text:span> — including:</text:p>
      <text:list text:style-name="L1">
        <text:list-item>
          <text:p text:style-name="P4">the <text:span text:style-name="Strong_20_Emphasis">vocabulary</text:span> (list of tokens) </text:p>
        </text:list-item>
        <text:list-item>
          <text:p text:style-name="P4">the <text:span text:style-name="Strong_20_Emphasis">merge rules</text:span> (the actual BPE pairs) </text:p>
        </text:list-item>
        <text:list-item>
          <text:p text:style-name="P4">the <text:span text:style-name="Strong_20_Emphasis">special tokens</text:span> </text:p>
        </text:list-item>
        <text:list-item>
          <text:p text:style-name="P4">the <text:span text:style-name="Strong_20_Emphasis">normalizer</text:span> (e.g., <text:span text:style-name="Source_20_Text">llama-spm</text:span>, <text:span text:style-name="Source_20_Text">byte_fallback</text:span>, etc.) </text:p>
        </text:list-item>
        <text:list-item>
          <text:p text:style-name="P5">the <text:span text:style-name="Strong_20_Emphasis">token type</text:span> (BPE, SentencePiece, WordPiece, Unigram, etc.) </text:p>
        </text:list-item>
      </text:list>
      <text:p text:style-name="P1">So when you say:</text:p>
      <text:p text:style-name="P6">Shimmytok reads the tokenizer directly from the GGUF file — same vocabulary, same BPE merges, same token boundaries the LLM will use.</text:p>
      <text:p text:style-name="P1">That’s exactly right.</text:p>
      <text:p text:style-name="P1">Shimmytok is essentially a <text:span text:style-name="Emphasis">GGUF-native tokenizer</text:span>, meaning:</text:p>
      <text:list text:style-name="L2">
        <text:list-item>
          <text:p text:style-name="P7">no external vocab files </text:p>
        </text:list-item>
        <text:list-item>
          <text:p text:style-name="P7">no mismatch between inference and preprocessing </text:p>
        </text:list-item>
        <text:list-item>
          <text:p text:style-name="P8">no drift between Rust-side tokenization and the model’s expectations </text:p>
        </text:list-item>
      </text:list>
      <text:p text:style-name="P2"/>
      <text:h text:style-name="P3" text:outline-level="2">🧩 What BPE <text:span text:style-name="Emphasis">actually does</text:span> in practice</text:h>
      <text:p text:style-name="P1">A quick, precise refresher — useful when designing modular pipelines:</text:p>
      <text:h text:style-name="P9" text:outline-level="3">BPE workflow</text:h>
      <text:list text:style-name="L3">
        <text:list-item>
          <text:p text:style-name="P10">Start with raw bytes or normalized text </text:p>
        </text:list-item>
        <text:list-item>
          <text:p text:style-name="P10">Split into initial symbols (often UTF‑8 bytes) </text:p>
        </text:list-item>
        <text:list-item>
          <text:p text:style-name="P10">Iteratively merge the most frequent adjacent pairs </text:p>
        </text:list-item>
        <text:list-item>
          <text:p text:style-name="P10">Continue until no merge rule applies </text:p>
        </text:list-item>
        <text:list-item>
          <text:p text:style-name="P11">Output the resulting subword tokens </text:p>
        </text:list-item>
      </text:list>
      <text:h text:style-name="P9" text:outline-level="3">Why LLMs use BPE</text:h>
      <text:list text:style-name="L4">
        <text:list-item>
          <text:p text:style-name="P12">deterministic </text:p>
        </text:list-item>
        <text:list-item>
          <text:p text:style-name="P12">compact vocabulary </text:p>
        </text:list-item>
        <text:list-item>
          <text:p text:style-name="P12">reversible </text:p>
        </text:list-item>
        <text:list-item>
          <text:p text:style-name="P12">efficient to implement </text:p>
        </text:list-item>
        <text:list-item>
          <text:p text:style-name="P13">stable across languages </text:p>
        </text:list-item>
      </text:list>
      <text:p text:style-name="P2"/>
      <text:h text:style-name="P3" text:outline-level="2">🧠 GGUF-specific nuance</text:h>
      <text:p text:style-name="P1">GGUF stores the tokenizer in a structured way: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tokenizer.ggml.model</text:span></text:p>
          </table:table-cell>
          <table:table-cell table:style-name="Table1.A1" office:value-type="string">
            <text:p text:style-name="Table_20_Contents"><text:span text:style-name="Source_20_Text">"bpe"</text:span> or <text:span text:style-name="Source_20_Text">"spm"</text:span> or <text:span text:style-name="Source_20_Text">"unigram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tokenizer.ggml.tokens</text:span></text:p>
          </table:table-cell>
          <table:table-cell table:style-name="Table1.A1" office:value-type="string">
            <text:p text:style-name="Table_20_Contents">actual token strings</text:p>
          </table:table-cell>
        </table:table-row>
        <table:table-row>
          <table:table-cell table:style-name="Table1.A1" office:value-type="string">
            <text:p text:style-name="Table_20_Contents"><text:span text:style-name="Source_20_Text">tokenizer.ggml.scores</text:span></text:p>
          </table:table-cell>
          <table:table-cell table:style-name="Table1.A1" office:value-type="string">
            <text:p text:style-name="Table_20_Contents">scores for each token</text:p>
          </table:table-cell>
        </table:table-row>
        <table:table-row>
          <table:table-cell table:style-name="Table1.A1" office:value-type="string">
            <text:p text:style-name="Table_20_Contents"><text:span text:style-name="Source_20_Text">tokenizer.ggml.merges</text:span></text:p>
          </table:table-cell>
          <table:table-cell table:style-name="Table1.A1" office:value-type="string">
            <text:p text:style-name="Table_20_Contents">BPE merge rul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tokenizer.ggml.bos/eos/unk/...</text:span></text:p>
          </table:table-cell>
          <table:table-cell table:style-name="Table1.A1" office:value-type="string">
            <text:p text:style-name="Table_20_Contents">special token IDs</text:p>
          </table:table-cell>
        </table:table-row>
        <table:table-row>
          <table:table-cell table:style-name="Table1.A1" office:value-type="string">
            <text:p text:style-name="Table_20_Contents"><text:span text:style-name="Source_20_Text">tokenizer.ggml.pre</text:span></text:p>
          </table:table-cell>
          <table:table-cell table:style-name="Table1.A1" office:value-type="string">
            <text:p text:style-name="Table_20_Contents">pre-tokenization rul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tokenizer.ggml.post</text:span></text:p>
          </table:table-cell>
          <table:table-cell table:style-name="Table1.A1" office:value-type="string">
            <text:p text:style-name="Table_20_Contents">post-tokenization rules</text:p>
          </table:table-cell>
        </table:table-row>
      </table:table>
      <text:p text:style-name="P1">Shimmytok reads all of these, so your Rust pipeline gets <text:span text:style-name="Strong_20_Emphasis">bit‑identical tokenization</text:span> to llama.cpp, ggml, and the model’s training setup.</text:p>
      <text:p text:style-name="P2"/>
      <text:h text:style-name="P3" text:outline-level="2">🧱 Why this matters for your Rust RAG pipeline</text:h>
      <text:p text:style-name="P1">Because you’re building a modular, reproducible system, this gives you:</text:p>
      <text:list text:style-name="L5">
        <text:list-item>
          <text:p text:style-name="P14"><text:span text:style-name="Strong_20_Emphasis">Guaranteed token alignment</text:span> with the model </text:p>
        </text:list-item>
        <text:list-item>
          <text:p text:style-name="P14"><text:span text:style-name="Strong_20_Emphasis">No dependency on external tokenizer libraries</text:span> </text:p>
        </text:list-item>
        <text:list-item>
          <text:p text:style-name="P14"><text:span text:style-name="Strong_20_Emphasis">Reproducible token boundaries</text:span> across machines </text:p>
        </text:list-item>
        <text:list-item>
          <text:p text:style-name="P14"><text:span text:style-name="Strong_20_Emphasis">Future-proofing</text:span> when switching GGUF models </text:p>
        </text:list-item>
        <text:list-item>
          <text:p text:style-name="P15"><text:span text:style-name="Strong_20_Emphasis">Cleaner architecture</text:span>: tokenizer = part of the model artifact </text:p>
        </text:list-item>
      </text:list>
      <text:p text:style-name="P1">It’s exactly the kind of design you like: self-contained, reversible, and teachable.</text:p>
      <text:p text:style-name="P2"/>
      <text:p text:style-name="P1">If you want, I can also break down:</text:p>
      <text:list text:style-name="L6">
        <text:list-item>
          <text:p text:style-name="P16">how BPE differs from SentencePiece in GGUF </text:p>
        </text:list-item>
        <text:list-item>
          <text:p text:style-name="P16">how to inspect the tokenizer section of a GGUF file </text:p>
        </text:list-item>
        <text:list-item>
          <text:p text:style-name="P16">how to build a tokenizer abstraction layer in Rust </text:p>
        </text:list-item>
        <text:list-item>
          <text:p text:style-name="P17">how to compare tokenization across GGUF, ONNX, and Ollama </text:p>
        </text:list-item>
      </text:list>
      <text:p text:style-name="P1">Just tell me which direction you want to explore next.</text:p>
      <text:p text:style-name="P1">Here’s the straight, architectural truth — and it’s one of those places where GGUF is beautifully strict.</text:p>
      <text:h text:style-name="P18" text:outline-level="1">🔒 Short answer</text:h>
      <text:p text:style-name="P1"><text:span text:style-name="Strong_20_Emphasis">No. You cannot “set” or override these tokenizer parameters at runtime.</text:span> <text:line-break/>Not in Shimmytok, not in llama.cpp, not in any GGUF‑based pipeline.</text:p>
      <text:p text:style-name="P1">The tokenizer inside a GGUF file is <text:span text:style-name="Strong_20_Emphasis">immutable</text:span>.<text:line-break/>It is part of the model artifact, not a configurable component.</text:p>
      <text:p text:style-name="P1">And that’s by design.</text:p>
      <text:p text:style-name="P2"/>
      <text:h text:style-name="P18" text:outline-level="1">🧱 Why you <text:span text:style-name="Emphasis">can’t</text:span> set them</text:h>
      <text:p text:style-name="P1">GGUF models embed:</text:p>
      <text:list text:style-name="L7">
        <text:list-item>
          <text:p text:style-name="P19">vocab </text:p>
        </text:list-item>
        <text:list-item>
          <text:p text:style-name="P19">merges </text:p>
        </text:list-item>
        <text:list-item>
          <text:p text:style-name="P19"><text:soft-page-break/>normalization rules </text:p>
        </text:list-item>
        <text:list-item>
          <text:p text:style-name="P19">special tokens </text:p>
        </text:list-item>
        <text:list-item>
          <text:p text:style-name="P20">behavior flags </text:p>
        </text:list-item>
      </text:list>
      <text:p text:style-name="P1">…because the LLM was <text:span text:style-name="Strong_20_Emphasis">trained</text:span> with those exact rules.<text:line-break/>Changing them would break token alignment and make the model unusable.</text:p>
      <text:p text:style-name="P1">So the tokenizer is <text:span text:style-name="Strong_20_Emphasis">read‑only</text:span>.</text:p>
      <text:p text:style-name="P2"/>
      <text:h text:style-name="P18" text:outline-level="1">🧩 What <text:span text:style-name="Emphasis">is</text:span> configurable</text:h>
      <text:p text:style-name="P1">You <text:span text:style-name="Emphasis">can</text:span> control a few <text:span text:style-name="Strong_20_Emphasis">runtime behaviors</text:span>, but only outside the tokenizer:</text:p>
      <text:h text:style-name="P9" text:outline-level="3">✔️ Allowed (runtime)</text:h>
      <text:list text:style-name="L8">
        <text:list-item>
          <text:p text:style-name="P21">whether <text:span text:style-name="Emphasis">you</text:span> add BOS/EOS tokens before calling the tokenizer </text:p>
        </text:list-item>
        <text:list-item>
          <text:p text:style-name="P21">whether you trim whitespace in your own preprocessing </text:p>
        </text:list-item>
        <text:list-item>
          <text:p text:style-name="P21">whether you chunk text before tokenization </text:p>
        </text:list-item>
        <text:list-item>
          <text:p text:style-name="P21">whether you apply your own RAG‑side normalization </text:p>
        </text:list-item>
        <text:list-item>
          <text:p text:style-name="P22">whether you override special token <text:span text:style-name="Emphasis">usage</text:span> (not definitions) </text:p>
        </text:list-item>
      </text:list>
      <text:p text:style-name="P1">These are pipeline decisions, not tokenizer settings.</text:p>
      <text:p text:style-name="P2"/>
      <text:h text:style-name="P18" text:outline-level="1">❌ Not allowed (immutable inside GGUF)</text:h>
      <text:p text:style-name="P1">You cannot change:</text:p>
      <text:list text:style-name="L9">
        <text:list-item>
          <text:p text:style-name="P23">vocab </text:p>
        </text:list-item>
        <text:list-item>
          <text:p text:style-name="P23">merges </text:p>
        </text:list-item>
        <text:list-item>
          <text:p text:style-name="P23">normalization rules </text:p>
        </text:list-item>
        <text:list-item>
          <text:p text:style-name="P23">byte fallback </text:p>
        </text:list-item>
        <text:list-item>
          <text:p text:style-name="P23">special token IDs </text:p>
        </text:list-item>
        <text:list-item>
          <text:p text:style-name="P23">token types </text:p>
        </text:list-item>
        <text:list-item>
          <text:p text:style-name="P23">SPM rules </text:p>
        </text:list-item>
        <text:list-item>
          <text:p text:style-name="P23">BPE rules </text:p>
        </text:list-item>
        <text:list-item>
          <text:p text:style-name="P23">prefix‑space behavior </text:p>
        </text:list-item>
        <text:list-item>
          <text:p text:style-name="P23">casing rules </text:p>
        </text:list-item>
        <text:list-item>
          <text:p text:style-name="P23">regex pre-tokenizer </text:p>
        </text:list-item>
        <text:list-item>
          <text:p text:style-name="P24">byte encoder/decoder </text:p>
        </text:list-item>
      </text:list>
      <text:p text:style-name="P1">These are baked into the GGUF file.</text:p>
      <text:p text:style-name="P2"/>
      <text:h text:style-name="P18" text:outline-level="1">🧠 The deeper architectural reason</text:h>
      <text:p text:style-name="P1">Tokenization is part of the model’s <text:span text:style-name="Strong_20_Emphasis">training distribution</text:span>.<text:line-break/>If you change it, even slightly, you break:</text:p>
      <text:list text:style-name="L10">
        <text:list-item>
          <text:p text:style-name="P25">positional alignment </text:p>
        </text:list-item>
        <text:list-item>
          <text:p text:style-name="P25">embedding lookup </text:p>
        </text:list-item>
        <text:list-item>
          <text:p text:style-name="P25">attention patterns </text:p>
        </text:list-item>
        <text:list-item>
          <text:p text:style-name="P26">learned subword statistics </text:p>
        </text:list-item>
      </text:list>
      <text:p text:style-name="P1">So GGUF enforces immutability to guarantee:</text:p>
      <text:list text:style-name="L11">
        <text:list-item>
          <text:p text:style-name="P27">reproducibility </text:p>
        </text:list-item>
        <text:list-item>
          <text:p text:style-name="P27"><text:soft-page-break/>cross‑platform consistency </text:p>
        </text:list-item>
        <text:list-item>
          <text:p text:style-name="P27">no silent drift </text:p>
        </text:list-item>
        <text:list-item>
          <text:p text:style-name="P28">no “token mismatch” bugs </text:p>
        </text:list-item>
      </text:list>
      <text:p text:style-name="P1">This is exactly the kind of design you appreciate:<text:line-break/><text:span text:style-name="Strong_20_Emphasis">self‑contained, deterministic, and impossible to misconfigure.</text:span></text:p>
      <text:p text:style-name="P2"/>
      <text:h text:style-name="P18" text:outline-level="1">🛠️ If you <text:span text:style-name="Emphasis">really</text:span> want to change tokenizer parameters</text:h>
      <text:p text:style-name="P1">There is only one valid path:</text:p>
      <text:h text:style-name="P9" text:outline-level="3">✔️ Rebuild the GGUF file</text:h>
      <text:p text:style-name="P1">You can:</text:p>
      <text:list text:style-name="L12">
        <text:list-item>
          <text:p text:style-name="P29">train a new tokenizer </text:p>
        </text:list-item>
        <text:list-item>
          <text:p text:style-name="P29">export a new vocab/merges/SPM model </text:p>
        </text:list-item>
        <text:list-item>
          <text:p text:style-name="P30">convert a model to GGUF with your tokenizer baked in </text:p>
        </text:list-item>
      </text:list>
      <text:p text:style-name="P1">But that’s a model‑conversion step, not a runtime setting.</text:p>
      <text:p text:style-name="P2"/>
      <text:h text:style-name="P18" text:outline-level="1">🧭 If you want, I can show you:</text:h>
      <text:list text:style-name="L13">
        <text:list-item>
          <text:p text:style-name="P31">how to inspect the tokenizer section of a GGUF file </text:p>
        </text:list-item>
        <text:list-item>
          <text:p text:style-name="P31">how to override BOS/EOS behavior safely in Rust </text:p>
        </text:list-item>
        <text:list-item>
          <text:p text:style-name="P31">how to build a tokenizer abstraction layer for your pipeline </text:p>
        </text:list-item>
        <text:list-item>
          <text:p text:style-name="P31">how to rebuild a GGUF with a custom tokenizer </text:p>
        </text:list-item>
        <text:list-item>
          <text:p text:style-name="P32">a TSV comparison of “immutable” vs “pipeline‑configurable” parameters </text:p>
        </text:list-item>
      </text:list>
      <text:p text:style-name="P1">Just tell me which direction you want to explore next.</text:p>
      <text:p text:style-name="P1"><text:span text:style-name="Strong_20_Emphasis">Why we need the LLM's tokenizer for chunk sizing:</text:span></text:p>
      <text:p text:style-name="P1">The chunks get assembled into a prompt and sent to the LLM. The LLM's context window is measured in the LLM's tokens. So when you ask "will these 3 retrieved chunks plus the system prompt fit in 2048 tokens?", the answer depends on the LLM's tokenizer, not the embedding model's.</text:p>
      <text:p text:style-name="P1">Shimmytok reads the tokenizer directly from the GGUF file — same vocabulary, same BPE merges, same token boundaries the LLM will use. That's what makes it exact.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31T09:20:37.836845513</dc:date>
    <meta:editing-duration>PT20H12M35S</meta:editing-duration>
    <meta:editing-cycles>3</meta:editing-cycles>
    <meta:generator>LibreOffice/25.8.5.2$Linux_X86_64 LibreOffice_project/580$Build-2</meta:generator>
    <meta:document-statistic meta:table-count="1" meta:image-count="0" meta:object-count="0" meta:page-count="4" meta:paragraph-count="130" meta:word-count="924" meta:character-count="5635" meta:non-whitespace-character-count="4834"/>
  </office:meta>
</office:document-meta>
</file>